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7jwSPyAUfTG9jGcLCNTRBffxrHNlAY0jp8k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2T23:36:22.985449676</meta:creation-date>
    <dc:date>2026-06-02T23:36:59.561394159</dc:date>
    <meta:editing-duration>PT38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26.2.3.2$Linux_X86_64 LibreOffice_project/620$Build-2</meta:generator>
  </office:meta>
</office:document-meta>
</file>