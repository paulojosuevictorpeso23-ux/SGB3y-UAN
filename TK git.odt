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DdeLink__7_4132739048"/>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<text:bookmark-end text:name="__DdeLink__7_413273904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2T23:36:22.985449676</meta:creation-date>
    <dc:date>2026-06-03T00:44:50.962386950</dc:date>
    <meta:editing-duration>PT1M27S</meta:editing-duration>
    <meta:editing-cycles>2</meta:editing-cycles>
    <meta:generator>LibreOffice/26.2.3.2$Linux_X86_64 LibreOffice_project/62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